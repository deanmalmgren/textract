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16380"/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jumps</text:p>
          </table:table-cell>
          <table:table-cell office:value-type="string" calcext:value-type="string">
            <text:p>over th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lazy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dog</text:p>
          </table:table-cell>
          <table:table-cell table:number-columns-repeated="2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an Malmgren</meta:initial-creator>
    <dc:creator>Dean Malmgren</dc:creator>
    <meta:creation-date>2014-08-25T19:38:31</meta:creation-date>
    <dc:date>2014-08-25T19:38:52</dc:date>
    <meta:generator>LibreOffice/26.2.4.2$MacOSX_AARCH64 LibreOffice_project/0229ac93fcf0d7cbc6376066c6f35021cef002dc</meta:generator>
    <meta:document-statistic meta:table-count="1" meta:cell-count="8" meta:object-count="0"/>
    <meta:user-defined meta:name="AppVersion">14.0300</meta:user-defined>
    <meta:user-defined meta:name="Company">Datascope Analytics</meta:user-defined>
  </office:meta>
</office:document-meta>
</file>