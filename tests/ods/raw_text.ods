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756in"/>
    </style:style>
    <style:style style:name="co2" style:family="table-column">
      <style:table-column-properties fo:break-before="auto" style:column-width="1.828in"/>
    </style:style>
    <style:style style:name="co3" style:family="table-column">
      <style:table-column-properties fo:break-before="auto" style:column-width="3.8209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1.2in"/>
    </style:style>
    <style:style style:name="co6" style:family="table-column">
      <style:table-column-properties fo:break-before="auto" style:column-width="1.0346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3.9752in"/>
    </style:style>
    <style:style style:name="co9" style:family="table-column">
      <style:table-column-properties fo:break-before="auto" style:column-width="0.4291in"/>
    </style:style>
    <style:style style:name="co10" style:family="table-column">
      <style:table-column-properties fo:break-before="auto" style:column-width="0.870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99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8" style:family="table-cell" style:parent-style-name="Default" style:data-style-name="N99"/>
    <style:style style:name="ce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0" style:family="table-cell" style:parent-style-name="Default" style:data-style-name="N0">
      <style:table-cell-properties style:rotation-align="none"/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8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9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20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Note">
      <style:graphic-properties draw:stroke="solid" svg:stroke-width="0in" svg:stroke-color="#000000" draw:stroke-linejoin="miter" svg:stroke-linecap="butt" draw:fill="solid" draw:fill-color="#4f81bd" draw:textarea-horizontal-align="justify" draw:textarea-vertical-align="middle" draw:fit-to-size="false" style:shrink-to-fit="false" loext:decorative="false"/>
      <style:paragraph-properties style:writing-mode="lr-tb" fo:text-align="center"/>
      <style:text-properties fo:color="#ffffff" loext:opacity="100%" style:text-outline="false" style:text-line-through-style="none" style:text-line-through-type="none" style:text-position="0% 100%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" style:family="paragraph">
      <loext:graphic-properties draw:fill="solid" draw:fill-color="#4f81bd"/>
      <style:paragraph-properties fo:text-align="center"/>
      <style:text-properties fo:color="#ffffff" loext:opacity="100%" style:text-outline="false" style:text-line-through-style="none" style:text-line-through-type="none" style:text-position="0% 100%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2" style:family="text">
      <style:text-properties style:use-window-font-color="true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normal" fo:font-style="normal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bold" fo:font-style="italic" style:font-weight-asian="bold" style:font-weight-complex="bold" style:font-style-asian="italic" style:font-style-complex="italic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5" style:family="text">
      <style:text-properties style:use-window-font-color="true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number-columns-repeated="3" table:default-cell-style-name="Default"/>
        <table:table-column table:style-name="co7" table:number-columns-repeated="16375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Description</text:p>
          </table:table-cell>
          <table:table-cell table:style-name="ce7" office:value-type="string" calcext:value-type="string">
            <text:p>New?</text:p>
          </table:table-cell>
          <table:table-cell table:style-name="ce9" office:value-type="string" calcext:value-type="string">
            <text:p>Help Topic</text:p>
          </table:table-cell>
          <table:table-cell table:style-name="ce9" office:value-type="string" calcext:value-type="string">
            <office:annotation office:display="true" draw:style-name="gr1" draw:text-style-name="P1" svg:width="1.7768in" svg:height="0.8433in" svg:x="10.5374in" svg:y="0.3437in" draw:caption-point-x="-0.3787in" draw:caption-point-y="-0.3398in">
              <dc:creator>John Walkenbach</dc:creator>
              <meta:date-string/>
              <text:p>Clicking a link in this column takes you to the Help topic at Microsoft's Office site.</text:p>
            </office:annotation>
            <text:p>Help</text:p>
          </table:table-cell>
          <table:table-cell/>
          <table:table-cell table:style-name="ce12"/>
          <table:table-cell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IFERROR</text:p>
          </table:table-cell>
          <table:table-cell office:value-type="string" calcext:value-type="string">
            <text:p>Returns a different result if the first argument evaluates to an error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A0123176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/>
          <table:table-cell table:style-name="ce12"/>
          <table:table-cell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AVERAGEIF</text:p>
          </table:table-cell>
          <table:table-cell office:value-type="string" calcext:value-type="string">
            <text:p>Returns the average for the cells specified by a given criterion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A1004743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/>
          <table:table-cell table:style-name="ce12"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AVERAGEIFS</text:p>
          </table:table-cell>
          <table:table-cell office:value-type="string" calcext:value-type="string">
            <text:p>Returns the average for the cells specified by multiple criteria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A1004749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COUNTIFS</text:p>
          </table:table-cell>
          <table:table-cell office:value-type="string" calcext:value-type="string">
            <text:p>Counts the number of cells that meet multiple criteria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A1004749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SUMIFS</text:p>
          </table:table-cell>
          <table:table-cell office:value-type="string" calcext:value-type="string">
            <text:p>Adds the cells specified by a multiple criteria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A1004750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Cube</text:p>
          </table:table-cell>
          <table:table-cell table:style-name="ce4" office:value-type="string" calcext:value-type="string">
            <text:p><text:a xlink:href="ms-help://MS.EXCEL.12.1033/EXCEL/content/HA10083017.htm" xlink:type="simple">CUBEMEMBER</text:a></text:p>
          </table:table-cell>
          <table:table-cell office:value-type="string" calcext:value-type="string">
            <text:p>Returns a member or tuple in a cube hierarchy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A1008301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Cube</text:p>
          </table:table-cell>
          <table:table-cell table:style-name="ce4" office:value-type="string" calcext:value-type="string">
            <text:p><text:a xlink:href="ms-help://MS.EXCEL.12.1033/EXCEL/content/HA10083018.htm" xlink:type="simple">CUBEVALUE</text:a></text:p>
          </table:table-cell>
          <table:table-cell office:value-type="string" calcext:value-type="string">
            <text:p>Returns an aggregated value from a cub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A1008301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Cube</text:p>
          </table:table-cell>
          <table:table-cell table:style-name="ce4" office:value-type="string" calcext:value-type="string">
            <text:p><text:a xlink:href="ms-help://MS.EXCEL.12.1033/EXCEL/content/HA10083019.htm" xlink:type="simple">CUBESET</text:a></text:p>
          </table:table-cell>
          <table:table-cell office:value-type="string" calcext:value-type="string">
            <text:p>Defines a calculated set of members or tuples by sending a set expression to the cube on the server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A1008301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Cube</text:p>
          </table:table-cell>
          <table:table-cell table:style-name="ce4" office:value-type="string" calcext:value-type="string">
            <text:p><text:a xlink:href="ms-help://MS.EXCEL.12.1033/EXCEL/content/HA10083020.htm" xlink:type="simple">CUBERANKEDMEMBER</text:a></text:p>
          </table:table-cell>
          <table:table-cell office:value-type="string" calcext:value-type="string">
            <text:p>Returns the nth, or ranked, member in a set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A1008302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Cube</text:p>
          </table:table-cell>
          <table:table-cell office:value-type="string" calcext:value-type="string">
            <text:p>CUBEKPIMEMBER</text:p>
          </table:table-cell>
          <table:table-cell office:value-type="string" calcext:value-type="string">
            <text:p>Returns a key performance indicator name, property, and measure, and displays the name and property in the cell.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A1008302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Cube</text:p>
          </table:table-cell>
          <table:table-cell table:style-name="ce4" office:value-type="string" calcext:value-type="string">
            <text:p><text:a xlink:href="ms-help://MS.EXCEL.12.1033/EXCEL/content/HA10083023.htm" xlink:type="simple">CUBEMEMBERPROPERTY</text:a></text:p>
          </table:table-cell>
          <table:table-cell office:value-type="string" calcext:value-type="string">
            <text:p>Returns the value of a member property in the cub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A1008302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Cube</text:p>
          </table:table-cell>
          <table:table-cell table:style-name="ce4" office:value-type="string" calcext:value-type="string">
            <text:p><text:a xlink:href="ms-help://MS.EXCEL.12.1033/EXCEL/content/HA10083024.htm" xlink:type="simple">CUBESETCOUNT</text:a></text:p>
          </table:table-cell>
          <table:table-cell office:value-type="string" calcext:value-type="string">
            <text:p>Returns the number of items in a set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A1008302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DAVERAGE</text:p>
          </table:table-cell>
          <table:table-cell office:value-type="string" calcext:value-type="string">
            <text:p>Averages the values in a column of a list or database that match conditions you specif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6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DCOUNT</text:p>
          </table:table-cell>
          <table:table-cell office:value-type="string" calcext:value-type="string">
            <text:p>Counts the cells that contain numbers in a column of a list or database that match conditions you specif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6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DCOUNTA</text:p>
          </table:table-cell>
          <table:table-cell office:value-type="string" calcext:value-type="string">
            <text:p>Counts the nonblank cells in a column of a list or database that match conditions you specif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6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DGET</text:p>
          </table:table-cell>
          <table:table-cell office:value-type="string" calcext:value-type="string">
            <text:p>Extracts a single value from a column of a list or database that matches conditions you specif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6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Returns the largest number in a column of a list or database that matches conditions you specif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7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DMIN</text:p>
          </table:table-cell>
          <table:table-cell office:value-type="string" calcext:value-type="string">
            <text:p>Returns the smallest number in a column of a list or database that matches conditions you specif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7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DPRODUCT</text:p>
          </table:table-cell>
          <table:table-cell office:value-type="string" calcext:value-type="string">
            <text:p>Multiplies the values in a column of a list or database that match conditions you specif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7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DSTDEV</text:p>
          </table:table-cell>
          <table:table-cell office:value-type="string" calcext:value-type="string">
            <text:p>Estimates the standard deviation of a population based on a sample by using the numbers in a column of a list or database that match conditions you specif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7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DSTDEVP</text:p>
          </table:table-cell>
          <table:table-cell office:value-type="string" calcext:value-type="string">
            <text:p>Calculates the standard deviation of a population based on the entire population, using the numbers in a column of a list or database that match conditions you specif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7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DSUM</text:p>
          </table:table-cell>
          <table:table-cell office:value-type="string" calcext:value-type="string">
            <text:p>Adds the numbers in a column of a list or database that match conditions you specif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7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DVAR</text:p>
          </table:table-cell>
          <table:table-cell office:value-type="string" calcext:value-type="string">
            <text:p>Estimates the variance of a population based on a sample by using the numbers in a column of a list or database that match conditions you specif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7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DVARP</text:p>
          </table:table-cell>
          <table:table-cell office:value-type="string" calcext:value-type="string">
            <text:p>Calculates the variance of a population based on the entire population by using the numbers in a column of a list or database that match conditions you specif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7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turns the serial number of a particular dat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8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DATEVALUE</text:p>
          </table:table-cell>
          <table:table-cell office:value-type="string" calcext:value-type="string">
            <text:p>Converts a date in the form of text to a serial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8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Converts a serial number to a day of the mon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8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DAYS360</text:p>
          </table:table-cell>
          <table:table-cell office:value-type="string" calcext:value-type="string">
            <text:p>Calculates the number of days between two dates, based on a 360-day yea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8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EDATE</text:p>
          </table:table-cell>
          <table:table-cell office:value-type="string" calcext:value-type="string">
            <text:p>Returns the serial number of the date that is the indicated number of months before or after the start dat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8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EOMONTH</text:p>
          </table:table-cell>
          <table:table-cell office:value-type="string" calcext:value-type="string">
            <text:p>Returns the serial number of the last day of the month before or after a specified number of month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8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Converts a serial number to an hou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8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Converts a serial number to a minut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9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Converts a serial number to a mon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9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NETWORKDAYS</text:p>
          </table:table-cell>
          <table:table-cell office:value-type="string" calcext:value-type="string">
            <text:p>Returns the number of whole workdays between two date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9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Returns the serial number of the current date and tim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9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Converts a serial number to a second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9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turns the serial number of a particular tim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9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TIMEVALUE</text:p>
          </table:table-cell>
          <table:table-cell office:value-type="string" calcext:value-type="string">
            <text:p>Converts a time in the form of text to a serial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9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Returns the serial number of today’s dat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9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WEEKDAY</text:p>
          </table:table-cell>
          <table:table-cell office:value-type="string" calcext:value-type="string">
            <text:p>Converts a serial number to a day of the week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9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Returns the week number in the yea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29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WORKDAY</text:p>
          </table:table-cell>
          <table:table-cell office:value-type="string" calcext:value-type="string">
            <text:p>Returns the serial number of the date before or after a specified number of workday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0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verts a serial number to a yea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0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YEARFRAC</text:p>
          </table:table-cell>
          <table:table-cell office:value-type="string" calcext:value-type="string">
            <text:p>Returns the year fraction representing the number of whole days between <text:span text:style-name="T1">start_date</text:span><text:span text:style-name="T2"> and </text:span><text:span text:style-name="T3">end_date</text:span>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0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BESSELI</text:p>
          </table:table-cell>
          <table:table-cell office:value-type="string" calcext:value-type="string">
            <text:p>Returns the modified Bessel function In(x)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0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BESSELJ</text:p>
          </table:table-cell>
          <table:table-cell office:value-type="string" calcext:value-type="string">
            <text:p>Returns the Bessel function Jn(x)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0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BESSELK</text:p>
          </table:table-cell>
          <table:table-cell office:value-type="string" calcext:value-type="string">
            <text:p>Returns the modified Bessel function Kn(x)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0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BESSELY</text:p>
          </table:table-cell>
          <table:table-cell office:value-type="string" calcext:value-type="string">
            <text:p>Returns the Bessel function Yn(x)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0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BIN2DEC</text:p>
          </table:table-cell>
          <table:table-cell office:value-type="string" calcext:value-type="string">
            <text:p>Converts a binary number to decimal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0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BIN2HEX</text:p>
          </table:table-cell>
          <table:table-cell office:value-type="string" calcext:value-type="string">
            <text:p>Converts a binary number to hexadecimal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0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BIN2OCT</text:p>
          </table:table-cell>
          <table:table-cell office:value-type="string" calcext:value-type="string">
            <text:p>Converts a binary number to octal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0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Converts real and imaginary coefficients into a complex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1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Converts a number from one measurement system to anoth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1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DEC2BIN</text:p>
          </table:table-cell>
          <table:table-cell office:value-type="string" calcext:value-type="string">
            <text:p>Converts a decimal number to binar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1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DEC2HEX</text:p>
          </table:table-cell>
          <table:table-cell office:value-type="string" calcext:value-type="string">
            <text:p>Converts a decimal number to hexadecimal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1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DEC2OCT</text:p>
          </table:table-cell>
          <table:table-cell office:value-type="string" calcext:value-type="string">
            <text:p>Converts a decimal number to octal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1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ests whether two values are equal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1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ERF</text:p>
          </table:table-cell>
          <table:table-cell office:value-type="string" calcext:value-type="string">
            <text:p>Returns the error func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1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ERFC</text:p>
          </table:table-cell>
          <table:table-cell office:value-type="string" calcext:value-type="string">
            <text:p>Returns the complementary error func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1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GESTEP</text:p>
          </table:table-cell>
          <table:table-cell office:value-type="string" calcext:value-type="string">
            <text:p>Tests whether a number is greater than a threshold valu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1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HEX2BIN</text:p>
          </table:table-cell>
          <table:table-cell office:value-type="string" calcext:value-type="string">
            <text:p>Converts a hexadecimal number to binar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1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HEX2DEC</text:p>
          </table:table-cell>
          <table:table-cell office:value-type="string" calcext:value-type="string">
            <text:p>Converts a hexadecimal number to decimal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2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HEX2OCT</text:p>
          </table:table-cell>
          <table:table-cell office:value-type="string" calcext:value-type="string">
            <text:p>Converts a hexadecimal number to octal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2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MABS</text:p>
          </table:table-cell>
          <table:table-cell office:value-type="string" calcext:value-type="string">
            <text:p>Returns the absolute value (modulus) of a complex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2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Returns the imaginary coefficient of a complex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2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MARGUMENT</text:p>
          </table:table-cell>
          <table:table-cell office:value-type="string" calcext:value-type="string">
            <text:p>Returns the argument <text:span text:style-name="T4">theta,</text:span><text:span text:style-name="T5"> an angle expressed in radians</text:span>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2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MCONJUGATE</text:p>
          </table:table-cell>
          <table:table-cell office:value-type="string" calcext:value-type="string">
            <text:p>Returns the complex conjugate of a complex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2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MCOS</text:p>
          </table:table-cell>
          <table:table-cell office:value-type="string" calcext:value-type="string">
            <text:p>Returns the cosine of a complex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2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MDIV</text:p>
          </table:table-cell>
          <table:table-cell office:value-type="string" calcext:value-type="string">
            <text:p>Returns the quotient of two complex number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2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MEXP</text:p>
          </table:table-cell>
          <table:table-cell office:value-type="string" calcext:value-type="string">
            <text:p>Returns the exponential of a complex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2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MLN</text:p>
          </table:table-cell>
          <table:table-cell office:value-type="string" calcext:value-type="string">
            <text:p>Returns the natural logarithm of a complex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3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MLOG10</text:p>
          </table:table-cell>
          <table:table-cell office:value-type="string" calcext:value-type="string">
            <text:p>Returns the base-10 logarithm of a complex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3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MLOG2</text:p>
          </table:table-cell>
          <table:table-cell office:value-type="string" calcext:value-type="string">
            <text:p>Returns the base-2 logarithm of a complex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3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MPOWER</text:p>
          </table:table-cell>
          <table:table-cell office:value-type="string" calcext:value-type="string">
            <text:p>Returns a complex number raised to an integer pow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3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MPRODUCT</text:p>
          </table:table-cell>
          <table:table-cell office:value-type="string" calcext:value-type="string">
            <text:p>Returns the product of complex number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3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MREAL</text:p>
          </table:table-cell>
          <table:table-cell office:value-type="string" calcext:value-type="string">
            <text:p>Returns the real coefficient of a complex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3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MSIN</text:p>
          </table:table-cell>
          <table:table-cell office:value-type="string" calcext:value-type="string">
            <text:p>Returns the sine of a complex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3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MSQRT</text:p>
          </table:table-cell>
          <table:table-cell office:value-type="string" calcext:value-type="string">
            <text:p>Returns the square root of a complex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3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MSUB</text:p>
          </table:table-cell>
          <table:table-cell office:value-type="string" calcext:value-type="string">
            <text:p>Returns the difference of two complex number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3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MSUM</text:p>
          </table:table-cell>
          <table:table-cell office:value-type="string" calcext:value-type="string">
            <text:p>Returns the sum of complex number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3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OCT2BIN</text:p>
          </table:table-cell>
          <table:table-cell office:value-type="string" calcext:value-type="string">
            <text:p>Converts an octal number to binar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4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OCT2DEC</text:p>
          </table:table-cell>
          <table:table-cell office:value-type="string" calcext:value-type="string">
            <text:p>Converts an octal number to decimal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4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OCT2HEX</text:p>
          </table:table-cell>
          <table:table-cell office:value-type="string" calcext:value-type="string">
            <text:p>Converts an octal number to hexadecimal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4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ACCRINT</text:p>
          </table:table-cell>
          <table:table-cell office:value-type="string" calcext:value-type="string">
            <text:p>Returns the accrued interest for a security that pays periodic interes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4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ACCRINTM</text:p>
          </table:table-cell>
          <table:table-cell office:value-type="string" calcext:value-type="string">
            <text:p>Returns the accrued interest for a security that pays interest at maturit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4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AMORDEGRC</text:p>
          </table:table-cell>
          <table:table-cell office:value-type="string" calcext:value-type="string">
            <text:p>Returns the depreciation for each accounting period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4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AMORLINC</text:p>
          </table:table-cell>
          <table:table-cell office:value-type="string" calcext:value-type="string">
            <text:p>Returns the depreciation for each accounting period (the depreciation coefficient depends on the life of the assets)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4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COUPDAYBS</text:p>
          </table:table-cell>
          <table:table-cell office:value-type="string" calcext:value-type="string">
            <text:p>Returns the number of days from the beginning of the coupon period to the settlement dat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4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COUPDAYS</text:p>
          </table:table-cell>
          <table:table-cell office:value-type="string" calcext:value-type="string">
            <text:p>Returns the number of days in the coupon period that contains the settlement dat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4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COUPDAYSNC</text:p>
          </table:table-cell>
          <table:table-cell office:value-type="string" calcext:value-type="string">
            <text:p>Returns the number of days from the settlement date to the next coupon dat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4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COUPNCD</text:p>
          </table:table-cell>
          <table:table-cell office:value-type="string" calcext:value-type="string">
            <text:p>Returns the next coupon date after the settlement dat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5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COUPNUM</text:p>
          </table:table-cell>
          <table:table-cell office:value-type="string" calcext:value-type="string">
            <text:p>Returns the number of coupons payable between the settlement date and maturity dat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5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COUPPCD</text:p>
          </table:table-cell>
          <table:table-cell office:value-type="string" calcext:value-type="string">
            <text:p>Returns the previous coupon date before the settlement dat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5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CUMIPMT</text:p>
          </table:table-cell>
          <table:table-cell office:value-type="string" calcext:value-type="string">
            <text:p>Returns the cumulative interest paid between two period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5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CUMPRINC</text:p>
          </table:table-cell>
          <table:table-cell office:value-type="string" calcext:value-type="string">
            <text:p>Returns the cumulative principal paid on a loan between two period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5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Returns the depreciation of an asset for a specified period, using the fixed-declining-balance method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5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DDB</text:p>
          </table:table-cell>
          <table:table-cell office:value-type="string" calcext:value-type="string">
            <text:p>Returns the depreciation of an asset for a specified period, using the double-declining-balance method or some other method that you specif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5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DISC</text:p>
          </table:table-cell>
          <table:table-cell office:value-type="string" calcext:value-type="string">
            <text:p>Returns the discount rate for a securit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5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DOLLARDE</text:p>
          </table:table-cell>
          <table:table-cell office:value-type="string" calcext:value-type="string">
            <text:p>Converts a dollar price, expressed as a fraction, into a dollar price, expressed as a decimal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5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DOLLARFR</text:p>
          </table:table-cell>
          <table:table-cell office:value-type="string" calcext:value-type="string">
            <text:p>Converts a dollar price, expressed as a decimal number, into a dollar price, expressed as a frac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5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turns the annual duration of a security with periodic interest payment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6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Returns the effective annual interest rat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6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FVSCHEDULE</text:p>
          </table:table-cell>
          <table:table-cell office:value-type="string" calcext:value-type="string">
            <text:p>Returns the future value of an initial principal after applying a series of compound interest rate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6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INTRATE</text:p>
          </table:table-cell>
          <table:table-cell office:value-type="string" calcext:value-type="string">
            <text:p>Returns the interest rate for a fully invested securit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6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IPMT</text:p>
          </table:table-cell>
          <table:table-cell office:value-type="string" calcext:value-type="string">
            <text:p>Returns the interest payment for an investment for a given period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6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Returns the internal rate of return for a series of cash flow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6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ISPMT</text:p>
          </table:table-cell>
          <table:table-cell office:value-type="string" calcext:value-type="string">
            <text:p>Returns the interest associated with a specific loan paymen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6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MDURATION</text:p>
          </table:table-cell>
          <table:table-cell office:value-type="string" calcext:value-type="string">
            <text:p>Returns the Macauley modified duration for a security with an assumed par value of $100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6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MIRR</text:p>
          </table:table-cell>
          <table:table-cell office:value-type="string" calcext:value-type="string">
            <text:p>Returns the internal rate of return where positive and negative cash flows are financed at different rate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6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Returns the annual nominal interest rat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6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NPER</text:p>
          </table:table-cell>
          <table:table-cell office:value-type="string" calcext:value-type="string">
            <text:p>Returns the number of periods for an investmen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7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ODDFPRICE</text:p>
          </table:table-cell>
          <table:table-cell office:value-type="string" calcext:value-type="string">
            <text:p>Returns the price per $100 face value of a security with an odd first period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7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ODDFYIELD</text:p>
          </table:table-cell>
          <table:table-cell office:value-type="string" calcext:value-type="string">
            <text:p>Returns the yield of a security with an odd first period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7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ODDLPRICE</text:p>
          </table:table-cell>
          <table:table-cell office:value-type="string" calcext:value-type="string">
            <text:p>Returns the price per $100 face value of a security with an odd last period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7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ODDLYIELD</text:p>
          </table:table-cell>
          <table:table-cell office:value-type="string" calcext:value-type="string">
            <text:p>Returns the yield of a security with an odd last period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7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turns the price per $100 face value of a security that pays periodic interes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7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PRICEDISC</text:p>
          </table:table-cell>
          <table:table-cell office:value-type="string" calcext:value-type="string">
            <text:p>Returns the price per $100 face value of a discounted securit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7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PRICEMAT</text:p>
          </table:table-cell>
          <table:table-cell office:value-type="string" calcext:value-type="string">
            <text:p>Returns the price per $100 face value of a security that pays interest at maturit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7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Returns the present value of an investmen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7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eturns the interest rate per period of an annuit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7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Returns the amount received at maturity for a fully invested securit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8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Returns the straight-line depreciation of an asset for one period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8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SYD</text:p>
          </table:table-cell>
          <table:table-cell office:value-type="string" calcext:value-type="string">
            <text:p>Returns the sum-of-years’ digits depreciation of an asset for a specified period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8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TBILLEQ</text:p>
          </table:table-cell>
          <table:table-cell office:value-type="string" calcext:value-type="string">
            <text:p>Returns the bond-equivalent yield for a Treasury bill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8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TBILLPRICE</text:p>
          </table:table-cell>
          <table:table-cell office:value-type="string" calcext:value-type="string">
            <text:p>Returns the price per $100 face value for a Treasury bill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8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TBILLYIELD</text:p>
          </table:table-cell>
          <table:table-cell office:value-type="string" calcext:value-type="string">
            <text:p>Returns the yield for a Treasury bill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8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VDB</text:p>
          </table:table-cell>
          <table:table-cell office:value-type="string" calcext:value-type="string">
            <text:p>Returns the depreciation of an asset for a specified or partial period using a declining-balance method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8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XIRR</text:p>
          </table:table-cell>
          <table:table-cell office:value-type="string" calcext:value-type="string">
            <text:p>Returns the internal rate of return for a schedule of cash flows that is not necessarily periodic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8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XNPV</text:p>
          </table:table-cell>
          <table:table-cell office:value-type="string" calcext:value-type="string">
            <text:p>Returns the net present value for a schedule of cash flows that is not necessarily periodic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8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Returns the yield on a security that pays periodic interes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8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YIELDDISC</text:p>
          </table:table-cell>
          <table:table-cell office:value-type="string" calcext:value-type="string">
            <text:p>Returns the annual yield for a discounted security, for example, a Treasury bill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9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YIELDMAT</text:p>
          </table:table-cell>
          <table:table-cell office:value-type="string" calcext:value-type="string">
            <text:p>Returns the annual yield of a security that pays interest at maturit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9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Returns information about the formatting, location, or contents of a cell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9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COUNTBLANK</text:p>
          </table:table-cell>
          <table:table-cell office:value-type="string" calcext:value-type="string">
            <text:p>Counts the number of blank cells in the argument rang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9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ERROR.TYPE</text:p>
          </table:table-cell>
          <table:table-cell office:value-type="string" calcext:value-type="string">
            <text:p>Returns a number corresponding to an error typ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9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eturns information about the current operating environmen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9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SEVEN</text:p>
          </table:table-cell>
          <table:table-cell office:value-type="string" calcext:value-type="string">
            <text:p>Returns TRUE if the number is eve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9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SODD</text:p>
          </table:table-cell>
          <table:table-cell office:value-type="string" calcext:value-type="string">
            <text:p>Returns TRUE if the number is odd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9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turns a value converted to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9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turns the error value #N/A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39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turns a number indicating the data type of a valu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0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gical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turns the logical value 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0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everses the logic of its argumen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0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turns TRUE if any argument is 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0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gical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turns the logical value 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0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okup &amp; 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Returns a reference as text to a single cell in a workshee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0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okup &amp; Reference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Returns the number of areas in a referenc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0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okup &amp; Referenc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turns the column number of a referenc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0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okup &amp; Reference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Returns the number of columns in a referenc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1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okup &amp; Reference</text:p>
          </table:table-cell>
          <table:table-cell office:value-type="string" calcext:value-type="string">
            <text:p>HLOOKUP</text:p>
          </table:table-cell>
          <table:table-cell office:value-type="string" calcext:value-type="string">
            <text:p>Searches for a value in the top column of a table and then returns a value in the same column from a row you specify in the tabl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1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okup &amp; Reference</text:p>
          </table:table-cell>
          <table:table-cell office:value-type="string" calcext:value-type="string">
            <text:p>HYPERLINK</text:p>
          </table:table-cell>
          <table:table-cell office:value-type="string" calcext:value-type="string">
            <text:p>Creates a shortcut that opens a document on your hard drive, a server, or the Interne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1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okup &amp; Referenc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turns a reference indicated by a text valu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1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okup &amp; Reference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Returns the relative position of an item in an arra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1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okup &amp; Referenc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Returns a reference offset from a given referenc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1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okup &amp; Referenc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Returns the number of rows in a referenc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1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okup &amp; Reference</text:p>
          </table:table-cell>
          <table:table-cell office:value-type="string" calcext:value-type="string">
            <text:p>RTD</text:p>
          </table:table-cell>
          <table:table-cell office:value-type="string" calcext:value-type="string">
            <text:p>Returns real-time data from a program that supports COM automa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1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eturns the absolute value of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1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ACOS</text:p>
          </table:table-cell>
          <table:table-cell office:value-type="string" calcext:value-type="string">
            <text:p>Returns the arccosine of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1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ACOSH</text:p>
          </table:table-cell>
          <table:table-cell office:value-type="string" calcext:value-type="string">
            <text:p>Returns the inverse hyperbolic cosine of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2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ASIN</text:p>
          </table:table-cell>
          <table:table-cell office:value-type="string" calcext:value-type="string">
            <text:p>Returns the arcsine of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2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ASINH</text:p>
          </table:table-cell>
          <table:table-cell office:value-type="string" calcext:value-type="string">
            <text:p>Returns the inverse hyperbolic sine of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2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ATAN</text:p>
          </table:table-cell>
          <table:table-cell office:value-type="string" calcext:value-type="string">
            <text:p>Returns the arctangent of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2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ATAN2</text:p>
          </table:table-cell>
          <table:table-cell office:value-type="string" calcext:value-type="string">
            <text:p>Returns the arctangent from x and y coordinate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2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ATANH</text:p>
          </table:table-cell>
          <table:table-cell office:value-type="string" calcext:value-type="string">
            <text:p>Returns the inverse hyperbolic tangent of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2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Rounds a number to the nearest integer or to the nearest multiple of significanc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2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COMBIN</text:p>
          </table:table-cell>
          <table:table-cell office:value-type="string" calcext:value-type="string">
            <text:p>Returns the number of combinations for a given number of object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2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Returns the cosine of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2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Returns the hyperbolic cosine of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2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Converts radians to degree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3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Rounds a number up to the nearest even integ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3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Returns <text:span text:style-name="T4">e</text:span><text:span text:style-name="T5"> raised to the power of a given number</text:span>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3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Returns the factorial of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3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FACTDOUBLE</text:p>
          </table:table-cell>
          <table:table-cell office:value-type="string" calcext:value-type="string">
            <text:p>Returns the double factorial of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3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Rounds a number down, toward 0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3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Returns the greatest common diviso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3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unds a number down to the nearest integ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3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Returns the least common multipl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3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Returns the natural logarithm of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3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Returns the logarithm of a number to a specified ba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4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LOG10</text:p>
          </table:table-cell>
          <table:table-cell office:value-type="string" calcext:value-type="string">
            <text:p>Returns the base-10 logarithm of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4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MDETERM</text:p>
          </table:table-cell>
          <table:table-cell office:value-type="string" calcext:value-type="string">
            <text:p>Returns the matrix determinant of an arra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4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Returns the remainder from divis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4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MROUND</text:p>
          </table:table-cell>
          <table:table-cell office:value-type="string" calcext:value-type="string">
            <text:p>Returns a number rounded to the desired multipl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4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Returns the multinomial of a set of number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4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Rounds a number up to the nearest odd integ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4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eturns the value of pi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4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Returns the result of a number raised to a pow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4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Multiplies its argument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4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QUOTIENT</text:p>
          </table:table-cell>
          <table:table-cell office:value-type="string" calcext:value-type="string">
            <text:p>Returns the integer portion of a divis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5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Converts degrees to radian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5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Returns a random number between 0 and 1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5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RANDBETWEEN</text:p>
          </table:table-cell>
          <table:table-cell office:value-type="string" calcext:value-type="string">
            <text:p>Returns a random number between the numbers that you specif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5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Converts an Arabic numeral to Roman, as tex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5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Rounds a number to a specified number of digit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5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ROUNDDOWN</text:p>
          </table:table-cell>
          <table:table-cell office:value-type="string" calcext:value-type="string">
            <text:p>Rounds a number down, toward 0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5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ROUNDUP</text:p>
          </table:table-cell>
          <table:table-cell office:value-type="string" calcext:value-type="string">
            <text:p>Rounds a number up, away from 0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5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SERIESSUM</text:p>
          </table:table-cell>
          <table:table-cell office:value-type="string" calcext:value-type="string">
            <text:p>Returns the sum of a power series based on the formula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5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eturns the sign of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5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Returns the sine of the given angl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6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SQRT</text:p>
          </table:table-cell>
          <table:table-cell office:value-type="string" calcext:value-type="string">
            <text:p>Returns a positive square roo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6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SQRTPI</text:p>
          </table:table-cell>
          <table:table-cell office:value-type="string" calcext:value-type="string">
            <text:p>Returns the square root of pi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6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Returns a subtotal in a list or databa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6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dds its argument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6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SUMIF</text:p>
          </table:table-cell>
          <table:table-cell office:value-type="string" calcext:value-type="string">
            <text:p>Adds the cells specified by a given criteria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6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SUMPRODUCT</text:p>
          </table:table-cell>
          <table:table-cell office:value-type="string" calcext:value-type="string">
            <text:p>Returns the sum of the products of corresponding array component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6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SUMSQ</text:p>
          </table:table-cell>
          <table:table-cell office:value-type="string" calcext:value-type="string">
            <text:p>Returns the sum of the squares of the argument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6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SUMX2MY2</text:p>
          </table:table-cell>
          <table:table-cell office:value-type="string" calcext:value-type="string">
            <text:p>Returns the sum of the difference of squares of corresponding values in two array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6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SUMX2PY2</text:p>
          </table:table-cell>
          <table:table-cell office:value-type="string" calcext:value-type="string">
            <text:p>Returns the sum of the sum of squares of corresponding values in two array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6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SUMXMY2</text:p>
          </table:table-cell>
          <table:table-cell office:value-type="string" calcext:value-type="string">
            <text:p>Returns the sum of squares of differences of corresponding values in two array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7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Returns the tangent of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7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turns the hyperbolic tangent of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7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TRUNC</text:p>
          </table:table-cell>
          <table:table-cell office:value-type="string" calcext:value-type="string">
            <text:p>Truncates a number (you specify the precision of the truncation)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7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okup &amp; Reference</text:p>
          </table:table-cell>
          <table:table-cell office:value-type="string" calcext:value-type="string">
            <text:p>GETPIVOTDATA</text:p>
          </table:table-cell>
          <table:table-cell office:value-type="string" calcext:value-type="string">
            <text:p>Returns data stored in a PivotTabl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7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AVEDEV</text:p>
          </table:table-cell>
          <table:table-cell office:value-type="string" calcext:value-type="string">
            <text:p>Returns the average of the absolute deviations of data points from their mea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8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Returns the average of its argument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8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AVERAGEA</text:p>
          </table:table-cell>
          <table:table-cell office:value-type="string" calcext:value-type="string">
            <text:p>Returns the average of its arguments and includes evaluation of text and logical value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8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BETADIST</text:p>
          </table:table-cell>
          <table:table-cell office:value-type="string" calcext:value-type="string">
            <text:p>Returns the cumulative beta probability density func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8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BETAINV</text:p>
          </table:table-cell>
          <table:table-cell office:value-type="string" calcext:value-type="string">
            <text:p>Returns the inverse of the cumulative beta probability density func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8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BINOMDIST</text:p>
          </table:table-cell>
          <table:table-cell office:value-type="string" calcext:value-type="string">
            <text:p>Returns the individual term binomial distribution probabilit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8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CHIDIST</text:p>
          </table:table-cell>
          <table:table-cell office:value-type="string" calcext:value-type="string">
            <text:p>Returns the one-tailed probability of the chi-squared 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8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CHIINV</text:p>
          </table:table-cell>
          <table:table-cell office:value-type="string" calcext:value-type="string">
            <text:p>Returns the inverse of the one-tailed probability of the chi-squared 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8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CHITEST</text:p>
          </table:table-cell>
          <table:table-cell office:value-type="string" calcext:value-type="string">
            <text:p>Returns the test for independenc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8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Returns the confidence interval for a population mea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9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CORREL</text:p>
          </table:table-cell>
          <table:table-cell office:value-type="string" calcext:value-type="string">
            <text:p>Returns the correlation coefficient between two data set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9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s how many numbers are in the list of argument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9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COUNTA</text:p>
          </table:table-cell>
          <table:table-cell office:value-type="string" calcext:value-type="string">
            <text:p>Counts how many values are in the list of argument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9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COVAR</text:p>
          </table:table-cell>
          <table:table-cell office:value-type="string" calcext:value-type="string">
            <text:p>Returns covariance, the average of the products of paired deviation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9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CRITBINOM</text:p>
          </table:table-cell>
          <table:table-cell office:value-type="string" calcext:value-type="string">
            <text:p>Returns the smallest value for which the cumulative binomial distribution is less than or equal to a criterion valu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9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DEVSQ</text:p>
          </table:table-cell>
          <table:table-cell office:value-type="string" calcext:value-type="string">
            <text:p>Returns the sum of squares of deviation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9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EXPONDIST</text:p>
          </table:table-cell>
          <table:table-cell office:value-type="string" calcext:value-type="string">
            <text:p>Returns the exponential 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9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FDIST</text:p>
          </table:table-cell>
          <table:table-cell office:value-type="string" calcext:value-type="string">
            <text:p>Returns the F probability 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9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FINV</text:p>
          </table:table-cell>
          <table:table-cell office:value-type="string" calcext:value-type="string">
            <text:p>Returns the inverse of the F probability 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49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Returns the Fisher transforma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0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FISHERINV</text:p>
          </table:table-cell>
          <table:table-cell office:value-type="string" calcext:value-type="string">
            <text:p>Returns the inverse of the Fisher transforma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0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Returns a value along a linear trend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0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turns a frequency distribution as a vertical arra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0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FTEST</text:p>
          </table:table-cell>
          <table:table-cell office:value-type="string" calcext:value-type="string">
            <text:p>Returns the result of an F-Tes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0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GAMMADIST</text:p>
          </table:table-cell>
          <table:table-cell office:value-type="string" calcext:value-type="string">
            <text:p>Returns the gamma 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0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GAMMAINV</text:p>
          </table:table-cell>
          <table:table-cell office:value-type="string" calcext:value-type="string">
            <text:p>Returns the inverse of the gamma cumulative 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0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GAMMALN</text:p>
          </table:table-cell>
          <table:table-cell office:value-type="string" calcext:value-type="string">
            <text:p>Returns the natural logarithm of the gamma function, G(x)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0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GEOMEAN</text:p>
          </table:table-cell>
          <table:table-cell office:value-type="string" calcext:value-type="string">
            <text:p>Returns the geometric mea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0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Returns values along an exponential trend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0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HARMEAN</text:p>
          </table:table-cell>
          <table:table-cell office:value-type="string" calcext:value-type="string">
            <text:p>Returns the harmonic mea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1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HYPGEOMDIST</text:p>
          </table:table-cell>
          <table:table-cell office:value-type="string" calcext:value-type="string">
            <text:p>Returns the hypergeometric 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1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Returns the intercept of the linear regression lin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1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Returns the kurtosis of a data se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1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Returns the <text:span text:style-name="T4">k</text:span><text:span text:style-name="T5">th largest value in a data set</text:span>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1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LOGINV</text:p>
          </table:table-cell>
          <table:table-cell office:value-type="string" calcext:value-type="string">
            <text:p>Returns the inverse of the lognormal 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1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LOGNORMDIST</text:p>
          </table:table-cell>
          <table:table-cell office:value-type="string" calcext:value-type="string">
            <text:p>Returns the cumulative lognormal 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1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eturns the maximum value in a list of arguments, ignoring logical values and tex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1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MAXA</text:p>
          </table:table-cell>
          <table:table-cell office:value-type="string" calcext:value-type="string">
            <text:p>Returns the maximum value in a list of arguments, including logical values and tex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1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eturns the median of the given number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1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eturns the minimum value in a list of arguments, ignoring logical values and tex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2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MINA</text:p>
          </table:table-cell>
          <table:table-cell office:value-type="string" calcext:value-type="string">
            <text:p>Returns the minimum value in a list of arguments, including logical values and tex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2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eturns the most common value in a data se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2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NEGBINOMDIST</text:p>
          </table:table-cell>
          <table:table-cell office:value-type="string" calcext:value-type="string">
            <text:p>Returns the negative binomial 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2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NORMDIST</text:p>
          </table:table-cell>
          <table:table-cell office:value-type="string" calcext:value-type="string">
            <text:p>Returns the normal cumulative 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2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NORMINV</text:p>
          </table:table-cell>
          <table:table-cell office:value-type="string" calcext:value-type="string">
            <text:p>Returns the inverse of the normal cumulative 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2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NORMSDIST</text:p>
          </table:table-cell>
          <table:table-cell office:value-type="string" calcext:value-type="string">
            <text:p>Returns the standard normal cumulative 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2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NORMSINV</text:p>
          </table:table-cell>
          <table:table-cell office:value-type="string" calcext:value-type="string">
            <text:p>Returns the inverse of the standard normal cumulative 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2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Returns the Pearson product moment correlation coefficien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2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PERCENTILE</text:p>
          </table:table-cell>
          <table:table-cell office:value-type="string" calcext:value-type="string">
            <text:p>Returns the <text:span text:style-name="T4">k</text:span><text:span text:style-name="T5">th percentile of values in a range</text:span>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2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PERCENTRANK</text:p>
          </table:table-cell>
          <table:table-cell office:value-type="string" calcext:value-type="string">
            <text:p>Returns the percentage rank of a value in a data se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3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PERMUT</text:p>
          </table:table-cell>
          <table:table-cell office:value-type="string" calcext:value-type="string">
            <text:p>Returns the number of permutations for a given number of object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3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Returns the Poisson 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3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Returns the probability that values in a range are between two limit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3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QUARTILE</text:p>
          </table:table-cell>
          <table:table-cell office:value-type="string" calcext:value-type="string">
            <text:p>Returns the quartile of a data se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3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Returns the rank of a number in a list of number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3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RSQ</text:p>
          </table:table-cell>
          <table:table-cell office:value-type="string" calcext:value-type="string">
            <text:p>Returns the square of the Pearson product moment correlation coefficien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3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SKEW</text:p>
          </table:table-cell>
          <table:table-cell office:value-type="string" calcext:value-type="string">
            <text:p>Returns the skewness of a 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3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Returns the slope of the linear regression lin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3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turns the <text:span text:style-name="T4">k</text:span><text:span text:style-name="T5">th smallest value in a data set</text:span>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3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STANDARDIZE</text:p>
          </table:table-cell>
          <table:table-cell office:value-type="string" calcext:value-type="string">
            <text:p>Returns a normalized valu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4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Estimates standard deviation based on a sample, ignoring text and logical value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4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STDEVA</text:p>
          </table:table-cell>
          <table:table-cell office:value-type="string" calcext:value-type="string">
            <text:p>Estimates standard deviation based on a sample, including text and logical value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4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STDEVP</text:p>
          </table:table-cell>
          <table:table-cell office:value-type="string" calcext:value-type="string">
            <text:p>Calculates standard deviation based on the entire population, ignoring text and logical value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4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STDEVPA</text:p>
          </table:table-cell>
          <table:table-cell office:value-type="string" calcext:value-type="string">
            <text:p>Calculates standard deviation based on the entire population, including text and logical value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4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STEYX</text:p>
          </table:table-cell>
          <table:table-cell office:value-type="string" calcext:value-type="string">
            <text:p>Returns the standard error of the predicted y-value for each x in the regress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4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TDIST</text:p>
          </table:table-cell>
          <table:table-cell office:value-type="string" calcext:value-type="string">
            <text:p>Returns the student’s t-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4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TINV</text:p>
          </table:table-cell>
          <table:table-cell office:value-type="string" calcext:value-type="string">
            <text:p>Returns the inverse of the student’s t-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4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Returns values along a linear trend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4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TRIMMEAN</text:p>
          </table:table-cell>
          <table:table-cell office:value-type="string" calcext:value-type="string">
            <text:p>Returns the mean of the interior of a data se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4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TTEST</text:p>
          </table:table-cell>
          <table:table-cell office:value-type="string" calcext:value-type="string">
            <text:p>Returns the probability associated with a student’s t-Tes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5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Estimates variance based on a sample, ignoring logical values and tex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5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VARA</text:p>
          </table:table-cell>
          <table:table-cell office:value-type="string" calcext:value-type="string">
            <text:p>Estimates variance based on a sample, including logical values and tex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5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VARP</text:p>
          </table:table-cell>
          <table:table-cell office:value-type="string" calcext:value-type="string">
            <text:p>Calculates variance based on the entire population, ignoring logical values and tex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5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VARPA</text:p>
          </table:table-cell>
          <table:table-cell office:value-type="string" calcext:value-type="string">
            <text:p>Calculates variance based on the entire population, including logical values and tex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5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WEIBULL</text:p>
          </table:table-cell>
          <table:table-cell office:value-type="string" calcext:value-type="string">
            <text:p>Returns the Weibull distribution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5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ZTEST</text:p>
          </table:table-cell>
          <table:table-cell office:value-type="string" calcext:value-type="string">
            <text:p>Returns the two-tailed P-value of a z-tes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5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AHTTEXT</text:p>
          </table:table-cell>
          <table:table-cell office:value-type="string" calcext:value-type="string">
            <text:p>Converts a number to Baht tex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5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Returns the character specified by the code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5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Removes all nonprintable characters from tex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6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Returns a numeric code for the first character in a text string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6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CONCATENATE</text:p>
          </table:table-cell>
          <table:table-cell office:value-type="string" calcext:value-type="string">
            <text:p>Joins several text items into one text item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6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Converts a number to text, using currency forma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6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Checks to see whether two text values are identical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6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ormats a number as text with a fixed number of decimal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6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turns the leftmost characters from a text valu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6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eturns the number of characters in a text string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6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Converts text to lowerca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7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Returns a specific number of characters from a text string, starting at the position you specif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7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Capitalizes the first letter in each word of a text valu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7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Replaces characters within tex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7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EPT</text:p>
          </table:table-cell>
          <table:table-cell office:value-type="string" calcext:value-type="string">
            <text:p>Repeats text a given number of time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7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turns the rightmost characters from a text valu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7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Finds one text value within another (not case sensitive)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7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Substitutes new text for old text in a text string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7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turns the text referred to by valu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7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ormats a number and converts it to tex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8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TRIM</text:p>
          </table:table-cell>
          <table:table-cell office:value-type="string" calcext:value-type="string">
            <text:p>Removes excess spaces from tex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8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Converts text to upperca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8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verts a text argument to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258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Returns the future value of an investmen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982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NPV</text:p>
          </table:table-cell>
          <table:table-cell office:value-type="string" calcext:value-type="string">
            <text:p>Returns the net present value of an investment based on a series of periodic cash flows and a discount rat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982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Returns the periodic payment for an annuit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982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PPMT</text:p>
          </table:table-cell>
          <table:table-cell office:value-type="string" calcext:value-type="string">
            <text:p>Returns the payment on the principal for an investment for a given period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982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SBLANK</text:p>
          </table:table-cell>
          <table:table-cell office:value-type="string" calcext:value-type="string">
            <text:p>Returns TRUE if the value is blank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HP1006982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SERR</text:p>
          </table:table-cell>
          <table:table-cell office:value-type="string" calcext:value-type="string">
            <text:p>Returns TRUE if the value is any error value except #N/A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HP1006982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SERROR</text:p>
          </table:table-cell>
          <table:table-cell office:value-type="string" calcext:value-type="string">
            <text:p>Returns TRUE if the value is any error val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HP1006982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SLOGICAL</text:p>
          </table:table-cell>
          <table:table-cell office:value-type="string" calcext:value-type="string">
            <text:p>Returns TRUE if the value is a logical val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HP1006982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SNA</text:p>
          </table:table-cell>
          <table:table-cell office:value-type="string" calcext:value-type="string">
            <text:p>Returns TRUE if the value is the #N/A error val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HP1006982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SNONTEXT</text:p>
          </table:table-cell>
          <table:table-cell office:value-type="string" calcext:value-type="string">
            <text:p>Returns TRUE if the value is not text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HP1006982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SNUMBER</text:p>
          </table:table-cell>
          <table:table-cell office:value-type="string" calcext:value-type="string">
            <text:p>Returns TRUE if the value is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HP1006982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SREF</text:p>
          </table:table-cell>
          <table:table-cell office:value-type="string" calcext:value-type="string">
            <text:p>Returns TRUE if the value is a referenc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HP1006982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STEXT</text:p>
          </table:table-cell>
          <table:table-cell office:value-type="string" calcext:value-type="string">
            <text:p>Returns TRUE if the value is text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HP10069827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s TRUE if all its arguments are 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982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Specifies a logical test to perform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982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okup &amp; Reference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Chooses a value from a list of value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983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okup &amp; Referenc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Uses an index to choose a value from a reference or arra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983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okup &amp; Reference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Returns a value either from a one-row or one-column range or from an arra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983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okup &amp; Referenc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Returns the row number of a referenc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983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okup &amp; Reference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Returns the transpose of an arra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9834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Lookup &amp; Reference</text:p>
          </table:table-cell>
          <table:table-cell office:value-type="string" calcext:value-type="string">
            <text:p>VLOOKUP</text:p>
          </table:table-cell>
          <table:table-cell office:value-type="string" calcext:value-type="string">
            <text:p>Searches for a value in the leftmost column of a table and then returns a value in the same row from a column you specify in the tabl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9835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Finds one text value within another (case sensitive)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9836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LINEST</text:p>
          </table:table-cell>
          <table:table-cell office:value-type="string" calcext:value-type="string">
            <text:p>Returns the parameters of a linear trend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9838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LOGEST</text:p>
          </table:table-cell>
          <table:table-cell office:value-type="string" calcext:value-type="string">
            <text:p>Returns the parameters of an exponential trend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9839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string" calcext:value-type="string">
            <text:p>COUNTIF</text:p>
          </table:table-cell>
          <table:table-cell office:value-type="string" calcext:value-type="string">
            <text:p>Counts the number of cells that meet the criteria you specify in the argument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9840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MINVERSE</text:p>
          </table:table-cell>
          <table:table-cell office:value-type="string" calcext:value-type="string">
            <text:p>Returns the matrix inverse of an array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9841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MMULT</text:p>
          </table:table-cell>
          <table:table-cell office:value-type="string" calcext:value-type="string">
            <text:p>Returns the matrix product of two arrays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9842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string" calcext:value-type="string">
            <text:p>SINH</text:p>
          </table:table-cell>
          <table:table-cell office:value-type="string" calcext:value-type="string">
            <text:p>Returns the hyperbolic sine of a number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P10069843</text:p>
          </table:table-cell>
          <table:table-cell table:formula="of:=HYPERLINK(SUBSTITUTE(HelpURLTemplate;&quot;xxxxxxxxxx&quot;;[help topic]);&quot;&lt;More Info&gt;&quot;)" office:value-type="string" office:string-value="" calcext:value-type="error">
            <text:p>Err:508</text:p>
          </table:table-cell>
          <table:table-cell table:number-columns-repeated="3"/>
          <table:table-cell table:style-name="Default" table:number-columns-repeated="16375"/>
        </table:table-row>
      </table:table>
      <table:table table:name="Sheet2" table:style-name="ta2">
        <table:table-column table:style-name="co1" table:default-cell-style-name="ce15"/>
        <table:table-column table:style-name="co8" table:default-cell-style-name="ce19"/>
        <table:table-column table:style-name="co9"/>
        <table:table-column table:style-name="co10"/>
        <table:table-column table:style-name="co7" table:number-columns-repeated="16380"/>
        <table:table-row table:style-name="ro1">
          <table:table-cell table:style-name="ce13" office:value-type="string" calcext:value-type="string">
            <text:p>Category</text:p>
          </table:table-cell>
          <table:table-cell table:style-name="ce17" office:value-type="string" calcext:value-type="string">
            <text:p>Count of Function</text:p>
          </table:table-cell>
          <table:table-cell table:style-name="Default" table:number-columns-repeated="16382"/>
        </table:table-row>
        <table:table-row table:style-name="ro1">
          <table:table-cell table:style-name="ce14" office:value-type="string" calcext:value-type="string">
            <text:p>Statistical</text:p>
          </table:table-cell>
          <table:table-cell table:style-name="ce18" office:value-type="float" office:value="83" calcext:value-type="float">
            <text:p>83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Math &amp; Trig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Text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Lookup &amp; Reference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ube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Logical</text:p>
          </table:table-cell>
          <table:table-cell table:style-name="ce20" office:value-type="float" office:value="7" calcext:value-type="float">
            <text:p>7</text:p>
          </table:table-cell>
          <table:table-cell table:style-name="Default" table:number-columns-repeated="16382"/>
        </table:table-row>
        <table:table-row table:style-name="ro1">
          <table:table-cell table:style-name="ce16" office:value-type="string" calcext:value-type="string">
            <text:p>Total Result</text:p>
          </table:table-cell>
          <table:table-cell table:style-name="ce21" office:value-type="float" office:value="340" calcext:value-type="float">
            <text:p>340</text:p>
          </table:table-cell>
          <table:table-cell table:style-name="Default" table:number-columns-repeated="16382"/>
        </table:table-row>
      </table:table>
      <table:named-expressions>
        <table:named-expression table:name="HelpURLTemplate" table:base-cell-address="$Sheet1.$A$1" table:expression="&quot;http://office.microsoft.com/client/helppreview.aspx?AssetID=xxxxxxxxxx1033&amp;QueryID=03RAPgEGJ&amp;respos=1&amp;rt=2&amp;ns=EXCEL&amp;lcid=1033&amp;pid=CH100645391033&quot;"/>
      </table:named-expressions>
      <table:database-ranges>
        <table:database-range table:name="Table1" table:target-range-address="Sheet1.A1:Sheet1.F341" table:display-filter-buttons="true"/>
      </table:database-ranges>
      <table:data-pilot-tables>
        <table:data-pilot-table table:name="PivotTable1" table:application-data="" table:target-range-address="Sheet2.A1:Sheet2.B13" table:buttons="Sheet2.A1" table:show-filter-button="false" loext:show-drill-down-buttons="true">
          <table:source-cell-range table:cell-range-address="Sheet1.A1:Sheet1.F341"/>
          <table:data-pilot-field table:source-field-name="Category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ube" table:display="true" table:show-details="true"/>
                <table:data-pilot-member table:name="Database" table:display="true" table:show-details="true"/>
                <table:data-pilot-member table:name="Date &amp; Time" table:display="true" table:show-details="true"/>
                <table:data-pilot-member table:name="Engineering" table:display="true" table:show-details="true"/>
                <table:data-pilot-member table:name="Financial" table:display="true" table:show-details="true"/>
                <table:data-pilot-member table:name="Information" table:display="true" table:show-details="true"/>
                <table:data-pilot-member table:name="Logical" table:display="true" table:show-details="true"/>
                <table:data-pilot-member table:name="Lookup &amp; Reference" table:display="true" table:show-details="true"/>
                <table:data-pilot-member table:name="Math &amp; Trig" table:display="true" table:show-details="true"/>
                <table:data-pilot-member table:name="Statistical" table:display="true" table:show-details="true"/>
                <table:data-pilot-member table:name="Text" table:display="true" table:show-details="true"/>
              </table:data-pilot-members>
              <table:data-pilot-sort-info table:order="descending" table:data-field="Function" table:sort-mode="data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escrip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Function" tableooo:display-name="Count of Function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 Theme">
      <loext:theme-colors loext:name="Custom 1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00"/>
        <loext:color loext:name="followed-hyperlink" loext:color="#7f7f7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worksheet functions.xlsx</dc:title>
    <dc:subject>Excel 2007 Bible</dc:subject>
    <meta:initial-creator>John Walkenbach</meta:initial-creator>
    <meta:keyword>©2007</meta:keyword>
    <meta:keyword>JWalk</meta:keyword>
    <meta:keyword>&amp;</meta:keyword>
    <meta:keyword>Associates</meta:keyword>
    <meta:keyword>Inc.</meta:keyword>
    <dc:description>Example file distributed with 'Excel 2007 Bile'</dc:description>
    <dc:creator>John Walkenbach</dc:creator>
    <meta:creation-date>2006-08-04T16:30:22</meta:creation-date>
    <dc:date>2006-11-13T15:55:46</dc:date>
    <meta:generator>LibreOffice/26.2.4.2$MacOSX_AARCH64 LibreOffice_project/0229ac93fcf0d7cbc6376066c6f35021cef002dc</meta:generator>
    <meta:document-statistic meta:table-count="2" meta:cell-count="2072" meta:object-count="0"/>
    <meta:user-defined meta:name="AppVersion">12.0000</meta:user-defined>
    <meta:user-defined meta:name="Company">JWalk &amp; Associates</meta:user-defined>
    <meta:user-defined meta:name="OOXMLCorePropertyCategory">http://www.j-walk.com/ss</meta:user-defined>
  </office:meta>
</office:document-meta>
</file>